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6C000002858F3746D3.png" manifest:media-type="image/png"/>
  <manifest:file-entry manifest:full-path="Pictures/100000000000025C0000016CB59E006D.png" manifest:media-type="image/png"/>
  <manifest:file-entry manifest:full-path="Pictures/1000000000000265000002725605D9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114c" officeooo:paragraph-rsid="0010114c"/>
    </style:style>
    <style:style style:name="P2" style:family="paragraph" style:parent-style-name="Standard">
      <style:text-properties fo:font-weight="bold" officeooo:rsid="0010114c" officeooo:paragraph-rsid="0010114c" style:font-weight-asian="bold" style:font-weight-complex="bold"/>
    </style:style>
    <style:style style:name="P3" style:family="paragraph" style:parent-style-name="Text_20_body">
      <style:text-properties officeooo:rsid="0010114c" officeooo:paragraph-rsid="00108919"/>
    </style:style>
    <style:style style:name="P4" style:family="paragraph" style:parent-style-name="Text_20_body">
      <style:text-properties officeooo:rsid="00108919" officeooo:paragraph-rsid="00108919"/>
    </style:style>
    <style:style style:name="P5" style:family="paragraph" style:parent-style-name="Text_20_body">
      <style:text-properties fo:font-weight="bold" officeooo:rsid="0010114c" officeooo:paragraph-rsid="00108919" style:font-weight-asian="bold" style:font-weight-complex="bold"/>
    </style:style>
    <style:style style:name="P6" style:family="paragraph" style:parent-style-name="Text_20_body">
      <style:text-properties fo:font-weight="normal" officeooo:rsid="00108919" officeooo:paragraph-rsid="00108919" style:font-weight-asian="normal" style:font-weight-complex="normal"/>
    </style:style>
    <style:style style:name="P7" style:family="paragraph" style:parent-style-name="Text_20_body">
      <style:text-properties fo:font-weight="normal" officeooo:rsid="00108919" officeooo:paragraph-rsid="0011b9e1" style:font-weight-asian="normal" style:font-weight-complex="normal"/>
    </style:style>
    <style:style style:name="T1" style:family="text">
      <style:text-properties officeooo:rsid="0010891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officeooo:rsid="00108919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1b9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x="-0.2091in" svg:y="0.0311in" svg:width="4.5681in" svg:height="4.6646in" draw:z-index="0"><draw:image xlink:href="Pictures/1000000000000265000002725605D98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line-break/><text:line-break/></text:p>
      <text:p text:style-name="Standard"/>
      <text:p text:style-name="Standard"/>
      <text:p text:style-name="Standard"/>
      <text:p text:style-name="P1"/>
      <text:p text:style-name="P1"><draw:frame draw:style-name="fr1" draw:name="Image2" text:anchor-type="char" svg:x="-0.2146in" svg:y="0.1457in" svg:width="6.2917in" svg:height="3.7917in" draw:z-index="1"><draw:image xlink:href="Pictures/100000000000025C0000016CB59E006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3" text:anchor-type="char" svg:x="-0.4752in" svg:y="0.048in" svg:width="6.4583in" svg:height="6.7189in" draw:z-index="2"><draw:image xlink:href="Pictures/100000000000026C000002858F3746D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[ Habit Tracker VT320 Design ]</text:p>
      <text:p text:style-name="P1"/>
      <text:p text:style-name="P3"><text:span text:style-name="Strong_20_Emphasis"><text:span text:style-name="T1">Q: </text:span></text:span><text:span text:style-name="Strong_20_Emphasis">The Tool:</text:span> <text:span text:style-name="T2">Which tool did you choose and why?</text:span></text:p>
      <text:p text:style-name="P3"><text:span text:style-name="Strong_20_Emphasis"><text:span text:style-name="T1">A: </text:span></text:span><text:span text:style-name="Strong_20_Emphasis"><text:span text:style-name="T3">I chose to use lovable, we used it in our webdev course with our project &amp; it seemed pretty good.</text:span></text:span></text:p>
      <text:p text:style-name="P3"><text:span text:style-name="Strong_20_Emphasis"><text:span text:style-name="T1">Q: <text:s/></text:span></text:span><text:span text:style-name="Strong_20_Emphasis">The Experience:</text:span> <text:span text:style-name="T2">How did designing through "conversation" feel compared to the traditional design process in Figma?</text:span></text:p>
      <text:p text:style-name="P3"><text:span text:style-name="Strong_20_Emphasis"><text:span text:style-name="T1">A: </text:span></text:span><text:span text:style-name="Strong_20_Emphasis"><text:span text:style-name="T3">I already knew that it will be easier &amp; I do like the fact we had same execution with the user interface. First mockup I did on photoshop by hand, then figma &amp; this, so this took the least time forsure.</text:span></text:span></text:p>
      <text:p text:style-name="P3"><text:span text:style-name="Strong_20_Emphasis">Pros and Cons:</text:span></text:p>
      <text:p text:style-name="P3"><text:span text:style-name="Strong_20_Emphasis"><text:span text:style-name="T1">Q: </text:span></text:span><text:span text:style-name="T2">Did the AI save time on routine tasks?</text:span></text:p>
      <text:p text:style-name="P4"><text:span text:style-name="T4">A: Sure it saved time, but personally I would not use it that much. Maybe in the future but as timebeing I want to learn myself how to do things &amp; avoid using AI when ever possible. (So basicly I only use it when assignment forces to use it.)</text:span></text:p>
      <text:p text:style-name="P5"><text:span text:style-name="Strong_20_Emphasis"><text:span text:style-name="T1">Q: </text:span></text:span>Did the AI understand your creative vision, or did you feel like you were "fighting" the algorithm?</text:p>
      <text:p text:style-name="P4">A: It understood me perfectly. Im surprised it nailed the VT320 style (Old terminal made by DEC used commonly in libraries back in the day)</text:p>
      <text:p text:style-name="P5"><text:span text:style-name="Strong_20_Emphasis"><text:span text:style-name="T1">Q: </text:span></text:span>Was the output high enough quality to serve as a real basis for a prototype?</text:p>
      <text:p text:style-name="P4">A: Output was way better then mine, site actually had the CRT flickering &amp; glow, which I did want for my site but...yeah didint do.</text:p>
      <text:p text:style-name="P5"><text:span text:style-name="Strong_20_Emphasis"><text:span text:style-name="T1">Q: </text:span></text:span>What challenges or limitations did you face?</text:p>
      <text:p text:style-name="P3"><text:span text:style-name="Strong_20_Emphasis"><text:span text:style-name="T3">A: Really didint face any challenges or limitations, it nailed the look and functionality straight up. </text:span></text:span></text:p>
      <text:p text:style-name="P3"><text:span text:style-name="Strong_20_Emphasis"><text:span text:style-name="T1">Q: </text:span></text:span><text:span text:style-name="Strong_20_Emphasis"><text:span text:style-name="T2">The Future:</text:span></text:span><text:span text:style-name="T2"> How do you believe these tools will change the role of a UI/UX designer over the next year?</text:span></text:p>
      <text:p text:style-name="P6">A: Well I think its time to accept the truth. AI is a super fast tool that will be integrated in many fields.</text:p>
      <text:p text:style-name="P7">Programming &amp; design is already heavily affected by it.</text:p>
      <text:p text:style-name="P7">I would recommend checking out indie web called neocities.<text:span text:style-name="T5">org.<text:line-break/>People creating “old” style websites, following the ideas from Tim Bernes-Lee how he wanted the web to be. 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31T11:41:43.984962500</meta:creation-date>
    <dc:date>2026-05-31T11:59:07.970382044</dc:date>
    <meta:editing-duration>PT4M44S</meta:editing-duration>
    <meta:editing-cycles>2</meta:editing-cycles>
    <meta:generator>LibreOffice/26.2.3.2$Linux_X86_64 LibreOffice_project/620$Build-2</meta:generator>
    <meta:document-statistic meta:table-count="0" meta:image-count="3" meta:object-count="0" meta:page-count="4" meta:paragraph-count="19" meta:word-count="345" meta:character-count="1840" meta:non-whitespace-character-count="1508"/>
  </office:meta>
</office:document-meta>
</file>