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0ce" officeooo:paragraph-rsid="001e30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view of a professional UX designer</text:p>
      <text:p text:style-name="P1">Roni Pihajoki</text:p>
      <text:p text:style-name="P1">31/5/2026</text:p>
      <text:p text:style-name="P1"/>
      <text:p text:style-name="P1">List three the most interesting/important/meaningful things that you learned while listening the interview.</text:p>
      <text:p text:style-name="P1">1.</text:p>
      <text:p text:style-name="P1">2.</text:p>
      <text:p text:style-name="P1">3.</text:p>
      <text:p text:style-name="P1"/>
      <text:p text:style-name="P1">What are <text:span text:style-name="Strong_20_Emphasis">your </text:span>best characteristics as a UI/UX designer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1T12:05:25.818148373</meta:creation-date>
    <dc:date>2026-05-31T12:40:47.928958371</dc:date>
    <meta:editing-duration>PT2M24S</meta:editing-duration>
    <meta:editing-cycles>1</meta:editing-cycles>
    <meta:document-statistic meta:table-count="0" meta:image-count="0" meta:object-count="0" meta:page-count="1" meta:paragraph-count="8" meta:word-count="34" meta:character-count="229" meta:non-whitespace-character-count="203"/>
    <meta:generator>LibreOffice/26.2.3.2$Linux_X86_64 LibreOffice_project/620$Build-2</meta:generator>
  </office:meta>
</office:document-meta>
</file>